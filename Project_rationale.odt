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07b9d2" officeooo:paragraph-rsid="0007b9d2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officeooo:rsid="0007b9d2" officeooo:paragraph-rsid="0007b9d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officeooo:rsid="0007b9d2" officeooo:paragraph-rsid="000b4a7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officeooo:rsid="0007b9d2" officeooo:paragraph-rsid="0007b9d2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1" fo:font-size="12pt" officeooo:rsid="0007b9d2" officeooo:paragraph-rsid="0007b9d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0b4a76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098ebb" officeooo:paragraph-rsid="000b4a76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officeooo:rsid="00098ebb" officeooo:paragraph-rsid="00098ebb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1" fo:font-size="12pt" officeooo:rsid="00098ebb" officeooo:paragraph-rsid="00098ebb" style:font-size-asian="10.5pt" style:font-size-complex="12pt"/>
    </style:style>
    <style:style style:name="T1" style:family="text">
      <style:text-properties officeooo:rsid="000b4a76"/>
    </style:style>
    <style:style style:name="T2" style:family="text">
      <style:text-properties style:font-name="Arial1" fo:font-size="12pt" officeooo:rsid="00098ebb" style:font-size-asian="12pt" style:font-size-complex="12pt"/>
    </style:style>
    <style:style style:name="T3" style:family="text">
      <style:text-properties style:font-name="Arial1"/>
    </style:style>
    <style:style style:name="T4" style:family="text">
      <style:text-properties officeooo:rsid="0009a6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ationale</text:p>
      <text:p text:style-name="P2"/>
      <text:p text:style-name="P3">1. Statement of the problem :</text:p>
      <text:p text:style-name="P3">How does an epidemic spread ? / How to limit the spread of an epidemic ?</text:p>
      <text:p text:style-name="P4"/>
      <text:p text:style-name="P3">2. Objectives :</text:p>
      <text:p text:style-name="P3">Represent the spread of an epidemic when different factors come into play (Epidemic rate, vaccination, social distance…)</text:p>
      <text:p text:style-name="P4"/>
      <text:p text:style-name="P4">3. Expected outcome :</text:p>
      <text:list text:style-name="L1">
        <text:list-item>
          <text:p text:style-name="P5">When the epidemic rate is more important the spread <text:span text:style-name="T1">should be</text:span> faster</text:p>
        </text:list-item>
        <text:list-item>
          <text:p text:style-name="P5">If a part of the population is vaccinate the spread <text:span text:style-name="T1">should be</text:span> less important</text:p>
        </text:list-item>
        <text:list-item>
          <text:p text:style-name="P5">If people follow a social distance the epidemic <text:span text:style-name="T1">should be</text:span> under control to a certain extent</text:p>
        </text:list-item>
      </text:list>
      <text:p text:style-name="P4"/>
      <text:p text:style-name="P6"><text:span text:style-name="T2">4. </text:span><text:span text:style-name="T3">Justification of the chosen approach :</text:span></text:p>
      <text:p text:style-name="P7">I choose to use netLogo because it simple and it show well what i want to represent. I try to represent it the most simple way how a realistic epidemic spread works, it’s why i use some parameters like the number of initial-infected, the propogation rate, the social distance… A real epidemic is more complicate but i choose to keep the thing simple for having a more comprehensive model.</text:p>
      <text:p text:style-name="P2"/>
      <text:p text:style-name="P8">5. Analysis of the model :</text:p>
      <text:p text:style-name="P8"/>
      <text:list text:style-name="L2">
        <text:list-item>
          <text:p text:style-name="P9">Evaluation of system performance : I think the model show how an epidemic spread, it is simple but wee can see well the change about the infection when we change the different<text:span text:style-name="T4">s</text:span> parameters.</text:p>
        </text:list-item>
        <text:list-item>
          <text:p text:style-name="P9">Limitations and assumptions : The time needed for recovering from the epidemic is the same for all (in reality it not). All people recover from the epidemic at a time (no one died from it). People who have been vaccinated cannot get sick, <text:span text:style-name="T4">same for the people that have been healed.</text:span></text:p>
        </text:list-item>
        <text:list-item>
          <text:p text:style-name="P9">Suggestions for improvement and future work : Can add others parameters like the lockdown, wearing a mask. <text:span text:style-name="T4">E</text:span>nsure that the <text:span text:style-name="T4">time needed for </text:span>healing isn't the same for everyone <text:span text:style-name="T4">and also add the possibility that the healed people can be sick another tim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07:44:53.784472000</meta:creation-date>
    <dc:date>2026-05-06T08:11:51.905025500</dc:date>
    <meta:editing-duration>PT14M51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5" meta:word-count="305" meta:character-count="1692" meta:non-whitespace-character-count="1408"/>
  </office:meta>
</office:document-meta>
</file>